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Título1" style:master-page-name="MP0" style:family="paragraph">
      <style:paragraph-properties fo:break-before="page"/>
      <style:text-properties style:font-name="Arial" style:font-name-complex="Arial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Título1" style:family="paragraph">
      <style:text-properties style:font-name="Arial" style:font-name-complex="Arial" fo:font-size="14pt" style:font-size-asian="14pt" style:font-size-complex="14pt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Título3" style:family="paragraph"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TableColumn12" style:family="table-column">
      <style:table-column-properties style:column-width="3.7416in"/>
    </style:style>
    <style:style style:name="TableColumn13" style:family="table-column">
      <style:table-column-properties style:column-width="1.1812in"/>
    </style:style>
    <style:style style:name="TableColumn14" style:family="table-column">
      <style:table-column-properties style:column-width="1.1812in"/>
    </style:style>
    <style:style style:name="Table11" style:family="table">
      <style:table-properties style:width="6.1041in" fo:margin-left="0in" table:align="center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P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P27" style:parent-style-name="Normal" style:family="paragraph">
      <style:paragraph-properties fo:text-align="center"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justify"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justify" fo:margin-bottom="0in" fo:line-height="100%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P35" style:parent-style-name="Normal" style:family="paragraph">
      <style:paragraph-properties fo:text-align="center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justify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justify" fo:margin-bottom="0in" fo:line-height="100%"/>
    </style:style>
    <style:style style:name="TableRow40" style:family="table-row">
      <style:table-row-properties style:min-row-height="0.3645in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justify"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justify"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P50" style:parent-style-name="Normal" style:family="paragraph">
      <style:paragraph-properties fo:text-align="center"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justify"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justify"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justify"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justify"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justify"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justify"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justify"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justify" fo:margin-bottom="0in" fo:line-height="100%"/>
    </style:style>
    <style:style style:name="P76" style:parent-style-name="Normal" style:family="paragraph">
      <style:text-properties fo:font-style="italic" style:font-style-asian="italic" style:font-style-complex="italic"/>
    </style:style>
    <style:style style:name="P77" style:parent-style-name="Normal" style:family="paragraph">
      <style:text-properties fo:font-style="italic" style:font-style-asian="italic" style:font-style-complex="italic"/>
    </style:style>
    <style:style style:name="P78" style:parent-style-name="Normal" style:family="paragraph">
      <style:paragraph-properties fo:break-before="page"/>
      <style:text-properties fo:font-style="italic" style:font-style-asian="italic" style:font-style-complex="italic"/>
    </style:style>
    <style:style style:name="P79" style:parent-style-name="Título3" style:family="paragraph">
      <style:text-properties style:font-name="Arial" style:font-name-complex="Arial" fo:font-size="12pt" style:font-size-asian="12pt" style:font-size-complex="12pt"/>
    </style:style>
    <style:style style:name="TableColumn81" style:family="table-column">
      <style:table-column-properties style:column-width="4.6395in"/>
    </style:style>
    <style:style style:name="Table80" style:family="table">
      <style:table-properties style:width="4.6395in" fo:margin-left="0in" table:align="center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</style:style>
    <style:style style:name="TableRow91" style:family="table-row">
      <style:table-row-properties style:min-row-height="0.3645in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P94" style:parent-style-name="Normal" style:family="paragraph">
      <style:text-properties fo:font-style="italic" style:font-style-asian="italic" style:font-style-complex="italic"/>
    </style:style>
    <style:style style:name="P95" style:parent-style-name="Normal" style:family="paragraph">
      <style:text-properties fo:font-style="italic" style:font-style-asian="italic" style:font-style-complex="italic"/>
    </style:style>
    <style:style style:name="P96" style:parent-style-name="Título2" style:family="paragraph">
      <style:text-properties style:font-name="Arial" style:font-name-complex="Arial" fo:font-size="14pt" style:font-size-asian="14pt" style:font-size-complex="14pt"/>
    </style:style>
    <style:style style:name="P97" style:parent-style-name="Título3" style:family="paragraph">
      <style:text-properties style:font-name="Arial" style:font-name-complex="Arial" fo:font-size="12pt" style:font-size-asian="12pt" style:font-size-complex="12pt"/>
    </style:style>
    <style:style style:name="TableColumn99" style:family="table-column">
      <style:table-column-properties style:column-width="6.493in"/>
    </style:style>
    <style:style style:name="Table98" style:family="table">
      <style:table-properties style:width="6.493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P115" style:parent-style-name="Normal" style:family="paragraph">
      <style:text-properties fo:font-style="italic" style:font-style-asian="italic" style:font-style-complex="italic"/>
    </style:style>
    <style:style style:name="T116" style:parent-style-name="Fuentedepárrafopredeter." style:family="text">
      <style:text-properties fo:font-style="italic" style:font-style-asian="italic" style:font-style-complex="italic"/>
    </style:style>
    <style:style style:name="P117" style:parent-style-name="Título2" style:family="paragraph">
      <style:text-properties style:font-name="Arial" style:font-name-complex="Arial" fo:font-size="14pt" style:font-size-asian="14pt" style:font-size-complex="14pt"/>
    </style:style>
    <style:style style:name="T118" style:parent-style-name="Fuentedepárrafopredeter." style:family="text">
      <style:text-properties fo:font-weight="bold" style:font-weight-asian="bold" style:font-weight-complex="bold"/>
    </style:style>
    <style:style style:name="T119" style:parent-style-name="Fuentedepárrafopredeter." style:family="text">
      <style:text-properties fo:font-weight="bold" style:font-weight-asian="bold" style:font-weight-complex="bold"/>
    </style:style>
    <style:style style:name="T120" style:parent-style-name="Fuentedepárrafopredeter." style:family="text">
      <style:text-properties fo:font-weight="bold" style:font-weight-asian="bold" style:font-weight-complex="bold"/>
    </style:style>
    <style:style style:name="P121" style:parent-style-name="Título2" style:family="paragraph">
      <style:text-properties style:font-name="Arial" style:font-name-complex="Arial" fo:font-size="14pt" style:font-size-asian="14pt" style:font-size-complex="14pt"/>
    </style:style>
    <style:style style:name="P122" style:parent-style-name="Normal" style:family="paragraph">
      <style:text-properties fo:font-style="italic" style:font-style-asian="italic" style:font-style-complex="italic"/>
    </style:style>
    <style:style style:name="P123" style:parent-style-name="Normal" style:family="paragraph">
      <style:text-properties fo:font-style="italic" style:font-style-asian="italic" style:font-style-complex="italic"/>
    </style:style>
    <style:style style:name="P124" style:parent-style-name="Normal" style:family="paragraph">
      <style:text-properties fo:font-style="italic" style:font-style-asian="italic" style:font-style-complex="italic"/>
    </style:style>
    <style:style style:name="T125" style:parent-style-name="Fuentedepárrafopredeter." style:family="text">
      <style:text-properties fo:font-style="italic" style:font-style-asian="italic" style:font-style-complex="italic"/>
    </style:style>
    <style:style style:family="graphic" style:name="a12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h text:style-name="P1" text:outline-level="1">PROPUESTA COMERCIAL - NEXAR POS</text:h>
      <text:p text:style-name="Normal"/>
      <text:p text:style-name="P2">Sistema Integral de Gestión y Facturación para Comercios</text:p>
      <text:p text:style-name="P3">Nexar POS es una solución tecnológica diseñada para optimizar el control de inventario, agilizar el proceso de ventas y garantizar la trazabilidad de su negocio. A continuación, presentamos nuestros planes de implementación y opciones de equipamiento.</text:p>
      <text:p text:style-name="P4"/>
      <text:h text:style-name="P5" text:outline-level="1">1. PLANES DE SOFTWARE (LICENCIAMIENTO)</text:h>
      <text:p text:style-name="P6">Ofrecemos opciones flexibles para adaptarnos al tamaño y presupuesto de su empresa:</text:p>
      <text:p text:style-name="P7"/>
      <text:h text:style-name="P8" text:outline-level="3">Opción A: Modelo por Suscripción (SaaS)</text:h>
      <text:p text:style-name="P9">Ideal para negocios que buscan mantener su inversión inicial baja, garantizando soporte continuo y actualizaciones constantes.</text:p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TIPOS DE PLANES</text:p>
          </table:table-cell>
          <table:table-cell table:style-name="TableCell18">
            <text:p text:style-name="P19">BASICO</text:p>
            <text:p text:style-name="P20">L.280.00 / mes</text:p>
          </table:table-cell>
          <table:table-cell table:style-name="TableCell21">
            <text:p text:style-name="P22">PRO</text:p>
            <text:p text:style-name="P23">L.400.00 / mes</text:p>
          </table:table-cell>
        </table:table-row>
        <table:table-row table:style-name="TableRow24">
          <table:table-cell table:style-name="TableCell25">
            <text:p text:style-name="P26">Punto de venta rápido (POS).</text:p>
            <text:p text:style-name="P27"/>
          </table:table-cell>
          <table:table-cell table:style-name="TableCell28">
            <text:p text:style-name="P29"><draw:frame draw:z-index="251658240" draw:style-name="a1" draw:name="Imagen 4" text:anchor-type="paragraph" svg:x="0.34683in" svg:y="0.02243in" svg:width="0.33796in" svg:height="0.33796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Control de inventario estándar.</text:p>
            <text:p text:style-name="P35"/>
          </table:table-cell>
          <table:table-cell table:style-name="TableCell36">
            <text:p text:style-name="P37"><draw:frame draw:z-index="251660288" draw:style-name="a2" draw:name="Imagen 4" text:anchor-type="paragraph" svg:x="0.34653in" svg:y="0.01178in" svg:width="0.33796in" svg:height="0.33796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Gestión de clientes y reportes básicos de ventas.</text:p>
          </table:table-cell>
          <table:table-cell table:style-name="TableCell43">
            <text:p text:style-name="P44"><draw:frame draw:z-index="251662336" draw:style-name="a3" draw:name="Imagen 4" text:anchor-type="paragraph" svg:x="0.34653in" svg:y="0.01513in" svg:width="0.33796in" svg:height="0.33796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45">
            <text:p text:style-name="P46"><draw:frame draw:z-index="251666432" draw:style-name="a4" draw:name="Imagen 4" text:anchor-type="paragraph" svg:x="0.37847in" svg:y="-0.75833in" svg:width="0.3375in" svg:height="0.3375in" style:rel-width="scale" style:rel-height="scale"><draw:image xlink:href="media/image2.png" xlink:type="simple" xlink:show="embed" xlink:actuate="onLoad"/><svg:title/><svg:desc/></draw:frame><draw:frame draw:z-index="251667456" draw:style-name="a5" draw:name="Imagen 4" text:anchor-type="paragraph" svg:x="0.37847in" svg:y="-0.37917in" svg:width="0.3375in" svg:height="0.3375in" style:rel-width="scale" style:rel-height="scale"><draw:image xlink:href="media/image2.png" xlink:type="simple" xlink:show="embed" xlink:actuate="onLoad"/><svg:title/><svg:desc/></draw:frame><draw:frame draw:z-index="251668480" draw:style-name="a6" draw:name="Imagen 4" text:anchor-type="paragraph" svg:x="0.37847in" svg:y="0.01458in" svg:width="0.3375in" svg:height="0.3375in" style:rel-width="scale" style:rel-height="scale"><draw:image xlink:href="media/image2.png" xlink:type="simple" xlink:show="embed" xlink:actuate="onLoad"/><svg:title/><svg:desc/></draw:frame><draw:frame draw:z-index="251669504" draw:style-name="a7" draw:name="Imagen 4" text:anchor-type="paragraph" svg:x="0.37899in" svg:y="0.40903in" svg:width="0.33796in" svg:height="0.33796in" style:rel-width="scale" style:rel-height="scale"><draw:image xlink:href="media/image2.png" xlink:type="simple" xlink:show="embed" xlink:actuate="onLoad"/><svg:title/><svg:desc/></draw:frame></text:p>
          </table:table-cell>
        </table:table-row>
        <table:table-row table:style-name="TableRow47">
          <table:table-cell table:style-name="TableCell48">
            <text:p text:style-name="P49">Tickets y recibos no fiscales.</text:p>
            <text:p text:style-name="P50"/>
          </table:table-cell>
          <table:table-cell table:style-name="TableCell51">
            <text:p text:style-name="P52"><draw:frame draw:z-index="251664384" draw:style-name="a8" draw:name="Imagen 4" text:anchor-type="paragraph" svg:x="0.34653in" svg:y="0.01917in" svg:width="0.33796in" svg:height="0.33796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Módulo Técnico: Gestión de garantías y registro de series.</text:p>
          </table:table-cell>
          <table:table-cell table:style-name="TableCell58">
            <text:p text:style-name="P59"><draw:frame draw:z-index="251674624" draw:style-name="a9" draw:name="Imagen 6" text:anchor-type="paragraph" svg:x="0.35069in" svg:y="0.05438in" svg:width="0.26555in" svg:height="0.26554in" style:rel-width="scale" style:rel-height="scale"><draw:image xlink:href="media/image3.png" xlink:type="simple" xlink:show="embed" xlink:actuate="onLoad"/><svg:title/><svg:desc/></draw:frame></text:p>
          </table:table-cell>
          <table:table-cell table:style-name="TableCell60">
            <text:p text:style-name="P61"><draw:frame draw:z-index="251671552" draw:style-name="a10" draw:name="Imagen 4" text:anchor-type="paragraph" svg:x="0.37847in" svg:y="0.01319in" svg:width="0.3375in" svg:height="0.3375in" style:rel-width="scale" style:rel-height="scale"><draw:image xlink:href="media/image2.png" xlink:type="simple" xlink:show="embed" xlink:actuate="onLoad"/><svg:title/><svg:desc/></draw:frame><draw:frame draw:z-index="251672576" draw:style-name="a11" draw:name="Imagen 4" text:anchor-type="paragraph" svg:x="0.37847in" svg:y="0.39236in" svg:width="0.3375in" svg:height="0.3375in" style:rel-width="scale" style:rel-height="scale"><draw:image xlink:href="media/image2.png" xlink:type="simple" xlink:show="embed" xlink:actuate="onLoad"/><svg:title/><svg:desc/></draw:frame><draw:frame draw:z-index="251673600" draw:style-name="a12" draw:name="Imagen 4" text:anchor-type="paragraph" svg:x="0.37847in" svg:y="0.78611in" svg:width="0.3375in" svg:height="0.3375in" style:rel-width="scale" style:rel-height="scale"><draw:image xlink:href="media/image2.png" xlink:type="simple" xlink:show="embed" xlink:actuate="onLoad"/><svg:title/><svg:desc/></draw:frame></text:p>
          </table:table-cell>
        </table:table-row>
        <table:table-row table:style-name="TableRow62">
          <table:table-cell table:style-name="TableCell63">
            <text:p text:style-name="P64">Módulo Comercial: Descuentos por mayoreo y generación de cotizaciones.</text:p>
          </table:table-cell>
          <table:table-cell table:style-name="TableCell65">
            <text:p text:style-name="P66"><draw:frame draw:z-index="251676672" draw:style-name="a13" draw:name="Imagen 6" text:anchor-type="paragraph" svg:x="0.35069in" svg:y="0.06303in" svg:width="0.26555in" svg:height="0.26554in" style:rel-width="scale" style:rel-height="scale"><draw:image xlink:href="media/image3.png" xlink:type="simple" xlink:show="embed" xlink:actuate="onLoad"/><svg:title/><svg:desc/></draw:frame>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Diseño de tickets personalizados (con logo y códigos QR/redes sociales).</text:p>
          </table:table-cell>
          <table:table-cell table:style-name="TableCell72">
            <text:p text:style-name="P73"><draw:frame draw:z-index="251678720" draw:style-name="a14" draw:name="Imagen 6" text:anchor-type="paragraph" svg:x="0.35069in" svg:y="0.06154in" svg:width="0.26555in" svg:height="0.26554in" style:rel-width="scale" style:rel-height="scale"><draw:image xlink:href="media/image3.png" xlink:type="simple" xlink:show="embed" xlink:actuate="onLoad"/><svg:title/><svg:desc/></draw:frame></text:p>
          </table:table-cell>
          <table:table-cell table:style-name="TableCell74">
            <text:p text:style-name="P75"/>
          </table:table-cell>
        </table:table-row>
      </table:table>
      <text:p text:style-name="P76"/>
      <text:p text:style-name="P77">Promoción: Al pagar<text:s/>9<text:s/>meses por adelantado, recibe el año completo.</text:p>
      <text:p text:style-name="P78"/>
      <text:soft-page-break/>
      <text:h text:style-name="P79" text:outline-level="3">Opción B: Licencia Vitalicia (Pago Único)</text:h>
      <text:p text:style-name="Normal">Para comercios que prefieren ser dueños del sistema sin pagos recurrentes.</text:p>
      <table:table table:style-name="Table80">
        <table:table-columns>
          <table:table-column table:style-name="TableColumn81"/>
        </table:table-columns>
        <table:table-row table:style-name="TableRow82">
          <table:table-cell table:style-name="TableCell83">
            <text:p text:style-name="P84">LICENCIA ELITE COMPLETA L.15,000.00</text:p>
          </table:table-cell>
        </table:table-row>
        <table:table-row table:style-name="TableRow85">
          <table:table-cell table:style-name="TableCell86">
            <text:p text:style-name="P87">Instalación del sistema completo<text:s/>hasta en 2<text:s/>equipos.</text:p>
          </table:table-cell>
        </table:table-row>
        <table:table-row table:style-name="TableRow88">
          <table:table-cell table:style-name="TableCell89">
            <text:p text:style-name="P90">Incluye todos los módulos tecnológicos y comerciales.</text:p>
          </table:table-cell>
        </table:table-row>
        <table:table-row table:style-name="TableRow91">
          <table:table-cell table:style-name="TableCell92">
            <text:p text:style-name="P93">Cero pagos mensuales por uso del sistema.</text:p>
          </table:table-cell>
        </table:table-row>
      </table:table>
      <text:p text:style-name="Normal"/>
      <text:p text:style-name="P94">Nota: Incluye 3 meses de soporte técnico gratuito frente a fallos de fábrica. Actualizaciones o reinstalaciones futuras por cambio de equipo tienen un costo por servicio.</text:p>
      <text:p text:style-name="P95"/>
      <text:h text:style-name="P96" text:outline-level="2">2. EQUIPAMIENTO TECNOLÓGICO</text:h>
      <text:p text:style-name="Normal"/>
      <text:h text:style-name="P97" text:outline-level="3">Combo POS Completo - L 11,500.00</text:h>
      <table:table table:style-name="Table98">
        <table:table-columns>
          <table:table-column table:style-name="TableColumn99"/>
        </table:table-columns>
        <table:table-row table:style-name="TableRow100">
          <table:table-cell table:style-name="TableCell101">
            <text:p text:style-name="P102">Computadora: Equipo Empresarial Refurbished optimizado para trabajo comercial.</text:p>
          </table:table-cell>
        </table:table-row>
        <table:table-row table:style-name="TableRow103">
          <table:table-cell table:style-name="TableCell104">
            <text:p text:style-name="P105">Monitor: Pantalla de<text:s/>excelente<text:s/>definición para una visualización clara del sistema.</text:p>
          </table:table-cell>
        </table:table-row>
        <table:table-row table:style-name="TableRow106">
          <table:table-cell table:style-name="TableCell107">
            <text:p text:style-name="P108">Impresora Térmica: Impresión rápida de tickets (58mm/80mm), sin uso de tinta.</text:p>
          </table:table-cell>
        </table:table-row>
        <table:table-row table:style-name="TableRow109">
          <table:table-cell table:style-name="TableCell110">
            <text:p text:style-name="P111">Lector de Código de Barras: Escáner láser de alta precisión.</text:p>
          </table:table-cell>
        </table:table-row>
        <table:table-row table:style-name="TableRow112">
          <table:table-cell table:style-name="TableCell113">
            <text:p text:style-name="P114">Periféricos: Teclado y mouse ergonómicos.</text:p>
          </table:table-cell>
        </table:table-row>
      </table:table>
      <text:p text:style-name="P115"/>
      <text:p text:style-name="Normal"><text:span text:style-name="T116">Incluye: Instalación de Windows, configuración de drivers, cableado y puesta en marcha en su local</text:span>.</text:p>
      <text:p text:style-name="Normal"/>
      <text:h text:style-name="P117" text:outline-level="2">3. TÉRMINOS Y CONDICIONES</text:h>
      <text:p text:style-name="Normal"/>
      <text:p text:style-name="Normal"><text:span text:style-name="T118">Capacitación:</text:span><text:s/>Todos los planes incluyen una (1) sesión de capacitación de 2 horas para el personal.</text:p>
      <text:p text:style-name="Normal"><text:span text:style-name="T119">Garantía de Hardware:</text:span><text:s/>El equipo informático cuenta con<text:s/>6<text:s/>meses de garantía por defectos de fábrica (no cubre daños por variaciones de voltaje o mal uso).</text:p>
      <text:p text:style-name="Normal"><text:span text:style-name="T120">Soporte Técnico:</text:span><text:s/>En la modalidad de suscripción, el soporte remoto por problemas del sistema está cubierto al 100%.</text:p>
      <text:p text:style-name="Normal"/>
      <text:p text:style-name="Normal"/>
      <text:soft-page-break/>
      <text:h text:style-name="P121" text:outline-level="2">4. SIGUIENTES PASOS Y CONTACTO</text:h>
      <text:p text:style-name="Normal"/>
      <text:p text:style-name="Normal">Si la propuesta es de su agrado, el siguiente paso es coordinar una visita técnica para evaluar el espacio de instalación en su local y definir la fecha de entrega del equipo.</text:p>
      <text:p text:style-name="Normal">Para consultas adicionales o para agendar la instalación, estamos a su total disposición.</text:p>
      <text:p text:style-name="Normal"/>
      <text:p text:style-name="Normal"/>
      <text:p text:style-name="Normal"/>
      <text:p text:style-name="Normal"/>
      <text:p text:style-name="P122">Proveedor: Ever Rolando Chávez Ramírez</text:p>
      <text:p text:style-name="P123">Ubicación: Santa Bárbara, S.B.</text:p>
      <text:p text:style-name="P124">Teléfono<text:s/>/<text:s/>WhatsApp: 3368-0903</text:p>
      <text:p text:style-name="Normal"><text:span text:style-name="T125">Correo: chavesramiresever@gmail.co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rial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HN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Aptos"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="Aptos"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="Aptos"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Aptos"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Aptos"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="Aptos"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="Aptos"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="Aptos"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="Aptos"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="Aptos"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="Aptos"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="Aptos"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="Aptos"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="Aptos"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="Aptos"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="Aptos"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cabezado"><draw:frame draw:z-index="251659264" draw:style-name="a0" draw:name="Imagen 1" text:anchor-type="paragraph" svg:x="6.15625in" svg:y="-0.34375in" svg:width="1.03819in" svg:height="1.05707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ver Chavez</meta:initial-creator>
    <dc:creator>Ever Chavez</dc:creator>
    <meta:creation-date>2026-06-20T05:10:00Z</meta:creation-date>
    <dc:date>2026-06-20T06:07:00Z</dc:date>
    <meta:print-date>2026-06-20T05:55:00Z</meta:print-date>
    <meta:template xlink:href="Normal.dotm" xlink:type="simple"/>
    <meta:editing-cycles>1</meta:editing-cycles>
    <meta:editing-duration>PT3420S</meta:editing-duration>
    <meta:document-statistic meta:page-count="3" meta:paragraph-count="5" meta:word-count="458" meta:character-count="2972" meta:row-count="20" meta:non-whitespace-character-count="2519"/>
  </office:meta>
</office:document-meta>
</file>